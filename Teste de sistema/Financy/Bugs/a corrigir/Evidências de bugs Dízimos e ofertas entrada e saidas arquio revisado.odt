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620000031D32437EABD83B1FA4.png" manifest:media-type="image/png"/>
  <manifest:file-entry manifest:full-path="Pictures/100000000000076500000333593EF6048C71AD99.png" manifest:media-type="image/png"/>
  <manifest:file-entry manifest:full-path="Pictures/100000000000075A0000034F793883FBEB2A4EB5.png" manifest:media-type="image/png"/>
  <manifest:file-entry manifest:full-path="Pictures/1000000000000768000003275232B75AA82E0886.png" manifest:media-type="image/png"/>
  <manifest:file-entry manifest:full-path="Pictures/1000000000000761000003434C51F589484BCD98.png" manifest:media-type="image/png"/>
  <manifest:file-entry manifest:full-path="Pictures/100000000000077F00000355CD3447BA7F40A4BB.png" manifest:media-type="image/png"/>
  <manifest:file-entry manifest:full-path="Pictures/100000000000071700000372FB2A9BF41994A9D7.png" manifest:media-type="image/png"/>
  <manifest:file-entry manifest:full-path="Pictures/100000000000075500000344B6174B5F5CFAAD77.png" manifest:media-type="image/png"/>
  <manifest:file-entry manifest:full-path="Pictures/100000000000076900000349F549DAE323919517.png" manifest:media-type="image/png"/>
  <manifest:file-entry manifest:full-path="Pictures/100000000000073A0000034DB67CAA13A0CA2838.png" manifest:media-type="image/png"/>
  <manifest:file-entry manifest:full-path="Pictures/10000000000007660000033233E8EA0ECD6AFD84.png" manifest:media-type="image/png"/>
  <manifest:file-entry manifest:full-path="Pictures/100000000000075F0000033DC3A9DF9AAFE60015.png" manifest:media-type="image/png"/>
  <manifest:file-entry manifest:full-path="Pictures/100000000000075E0000033A59F937644D0CC7C6.png" manifest:media-type="image/png"/>
  <manifest:file-entry manifest:full-path="Pictures/100000000000076000000358E2C08240A729BE89.png" manifest:media-type="image/png"/>
  <manifest:file-entry manifest:full-path="Pictures/1000000000000774000003579E518D4F022B7FAB.png" manifest:media-type="image/png"/>
  <manifest:file-entry manifest:full-path="Pictures/100000000000076300000329056C3511DBF6F083.png" manifest:media-type="image/png"/>
  <manifest:file-entry manifest:full-path="Pictures/100000000000076600000348A71F6C8C92E7C1C8.png" manifest:media-type="image/png"/>
  <manifest:file-entry manifest:full-path="Pictures/100000000000075200000348D97A7527D85873E2.png" manifest:media-type="image/png"/>
  <manifest:file-entry manifest:full-path="Pictures/100000000000075300000347EDF0A220135556BA.png" manifest:media-type="image/png"/>
  <manifest:file-entry manifest:full-path="Pictures/10000000000007680000034DA7BE272C5D6BE4C9.png" manifest:media-type="image/png"/>
  <manifest:file-entry manifest:full-path="Pictures/1000000000000764000002F97445C8AD7F3DCFE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85db" officeooo:paragraph-rsid="000685db"/>
    </style:style>
    <style:style style:name="P2" style:family="paragraph" style:parent-style-name="Standard">
      <style:text-properties officeooo:rsid="0006d9e9" officeooo:paragraph-rsid="0006d9e9"/>
    </style:style>
    <style:style style:name="P3" style:family="paragraph" style:parent-style-name="Standard">
      <style:paragraph-properties fo:text-align="center" style:justify-single-word="false"/>
      <style:text-properties fo:font-size="22pt" officeooo:rsid="000685db" officeooo:paragraph-rsid="000685db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685db" officeooo:paragraph-rsid="000685db" style:font-size-asian="16pt" style:font-size-complex="16pt"/>
    </style:style>
    <style:style style:name="P5" style:family="paragraph" style:parent-style-name="Standard">
      <style:text-properties officeooo:rsid="000685db" officeooo:paragraph-rsid="000685db"/>
    </style:style>
    <style:style style:name="P6" style:family="paragraph" style:parent-style-name="Standard">
      <style:text-properties fo:color="#c9211e" loext:opacity="100%" officeooo:rsid="00082fcf" officeooo:paragraph-rsid="00082fcf"/>
    </style:style>
    <style:style style:name="P7" style:family="paragraph" style:parent-style-name="Standard">
      <style:text-properties fo:color="#5983b0" loext:opacity="100%" officeooo:rsid="00082fcf" officeooo:paragraph-rsid="00082fcf"/>
    </style:style>
    <style:style style:name="P8" style:family="paragraph" style:parent-style-name="Standard">
      <style:text-properties officeooo:rsid="0006d9e9" officeooo:paragraph-rsid="0006d9e9"/>
    </style:style>
    <style:style style:name="T1" style:family="text">
      <style:text-properties officeooo:rsid="0006d9e9"/>
    </style:style>
    <style:style style:name="T2" style:family="text">
      <style:text-properties fo:color="#3465a4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latório de Evidências de bugs <text:span text:style-name="T1">registro de Dízimos e Ofertas</text:span></text:p>
      <text:p text:style-name="P1"/>
      <text:p text:style-name="P1"/>
      <text:p text:style-name="P1"/>
      <text:p text:style-name="P1">Erro: ao preencher <text:span text:style-name="T1">somente </text:span>o campo “valor” <text:span text:style-name="T1">em ambas as opções (Registrar dízimo ou ofertas) </text:span>e depois clicar em registrar, o sistema está mostrando uma mensagem incoerente com a tela. A mensagem correta deveria solicitar que o usuário inserisse os campos obrigatórios restantes como mês/ano e usuários. </text:p>
      <text:p text:style-name="P7"><text:span text:style-name="T2">Corrigido pelo desenvolvedor Eliabe Nascimento.</text:span> </text:p>
      <text:p text:style-name="P1"><draw:frame draw:style-name="fr2" draw:name="Figura1" text:anchor-type="char" svg:width="17cm" svg:height="7.168cm" draw:z-index="0"><draw:image xlink:href="Pictures/10000000000007620000031D32437EABD83B1FA4.png" xlink:type="simple" xlink:show="embed" xlink:actuate="onLoad" draw:mime-type="image/png"/></draw:frame>.</text:p>
      <text:p text:style-name="P1"><draw:frame draw:style-name="fr1" draw:name="Figura6" text:anchor-type="char" svg:width="17cm" svg:height="7.354cm" draw:z-index="5"><draw:image xlink:href="Pictures/100000000000076500000333593EF6048C71AD99.png" xlink:type="simple" xlink:show="embed" xlink:actuate="onLoad" draw:mime-type="image/png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Erro: não está sendo obrigatório inserir a data de nascimento para cadastrar novo usuário, ao clicar em “confirmar” o sistema segue e <text:span text:style-name="T1">um</text:span> novo usuário e cadastrado sem data de nascimento. </text:p>
      <text:p text:style-name="P7"><text:span text:style-name="T2">Corrigido pelo desenvolvedor Eliabe Nascimento.</text:span></text:p>
      <text:p text:style-name="P1"><draw:frame draw:style-name="fr1" draw:name="Figura2" text:anchor-type="char" svg:width="17cm" svg:height="7.235cm" draw:z-index="1"><draw:image xlink:href="Pictures/1000000000000768000003275232B75AA82E0886.png" xlink:type="simple" xlink:show="embed" xlink:actuate="onLoad" draw:mime-type="image/png"/></draw:frame>.</text:p>
      <text:p text:style-name="P1"><draw:frame draw:style-name="fr2" draw:name="Figura19" text:anchor-type="char" svg:width="17cm" svg:height="7.571cm" draw:z-index="18"><draw:image xlink:href="Pictures/100000000000075500000344B6174B5F5CFAAD7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Erro: o campo “Data Nascimento permite inserir ano a partir de 0001.</text:p>
      <text:p text:style-name="P6">Atenção: Erro não corrigido.</text:p>
      <text:p text:style-name="P1"><draw:frame draw:style-name="fr1" draw:name="Figura3" text:anchor-type="char" svg:width="17cm" svg:height="7.535cm" draw:z-index="2"><draw:image xlink:href="Pictures/100000000000076900000349F549DAE323919517.png" xlink:type="simple" xlink:show="embed" xlink:actuate="onLoad" draw:mime-type="image/png"/></draw:frame>.</text:p>
      <text:p text:style-name="P1">Erro: o campo “Data Nascimento” permite inserir até 6 dígitos com número de anos incoerentes.</text:p>
      <text:p text:style-name="P6">Atenção: Erro não corrigido.</text:p>
      <text:p text:style-name="P1"><draw:frame draw:style-name="fr1" draw:name="Figura4" text:anchor-type="char" svg:width="17cm" svg:height="7.557cm" draw:z-index="3"><draw:image xlink:href="Pictures/100000000000077F00000355CD3447BA7F40A4BB.png" xlink:type="simple" xlink:show="embed" xlink:actuate="onLoad" draw:mime-type="image/png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Erro: o sistema permite que vários usuários com mesmo nome sejam cadastrados de forma que não tem como saber quem são e se pertencem realmente ao sistema, abrindo espaço para usuários fictícios.</text:p>
      <text:p text:style-name="P1">Erro: por ter dos usuários com mesmo nome o sistema não permite selecioná-los. Quando clico no nome repetido o sistema automaticamente seleciona o nome que esta a cima ou a baixo do nome repetido na lista. </text:p>
      <text:p text:style-name="P1">Sugestão: mostra isso ao cliente para que ele possa compreender que do jeito que essa opção está, pode trazer instabilidade de dados para o sistema financeiro e possíveis erros futuros.</text:p>
      <text:p text:style-name="P6">Atenção: Erro não corrigido.</text:p>
      <text:p text:style-name="P1"><draw:frame draw:style-name="fr1" draw:name="Figura5" text:anchor-type="char" svg:width="17cm" svg:height="7.765cm" draw:z-index="4"><draw:image xlink:href="Pictures/100000000000073A0000034DB67CAA13A0CA2838.png" xlink:type="simple" xlink:show="embed" xlink:actuate="onLoad" draw:mime-type="image/png"/></draw:frame>.</text:p>
      <text:p text:style-name="P1"><draw:frame draw:style-name="fr1" draw:name="Figura20" text:anchor-type="char" svg:width="17cm" svg:height="7.514cm" draw:z-index="19"><draw:image xlink:href="Pictures/1000000000000761000003434C51F589484BCD98.png" xlink:type="simple" xlink:show="embed" xlink:actuate="onLoad" draw:mime-type="image/png"/></draw:frame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rro: ao clicar campo “Ofertas” não está abrindo a descriminação dos registros cadastrados.</text:p>
      <text:p text:style-name="P7"><text:span text:style-name="T2">Corrigido pelo desenvolvedor Eliabe Nascimento.</text:span></text:p>
      <text:p text:style-name="P2"><draw:frame draw:style-name="fr1" draw:name="Figura21" text:anchor-type="char" svg:width="17cm" svg:height="7.341cm" draw:z-index="20"><draw:image xlink:href="Pictures/10000000000007660000033233E8EA0ECD6AFD8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3">Relatório de bugs “Entradas e Saídas”</text:p>
      <text:p text:style-name="P1"/>
      <text:p text:style-name="P1"/>
      <text:p text:style-name="P1">Ao clicar em “Entradas” o usuário é direcionado para uma tela de registro.</text:p>
      <text:p text:style-name="P1"><draw:frame draw:style-name="fr1" draw:name="Figura9" text:anchor-type="char" svg:width="17cm" svg:height="7.468cm" draw:z-index="8"><draw:image xlink:href="Pictures/100000000000075F0000033DC3A9DF9AAFE60015.png" xlink:type="simple" xlink:show="embed" xlink:actuate="onLoad" draw:mime-type="image/png"/></draw:frame>Sugestão: na tela de registro de entrada em sua parte superior poderia ter o nome “registro de entradas” para melhor especificação da tela.</text:p>
      <text:p text:style-name="P7"><text:span text:style-name="T2">Corrigido pelo desenvolvedor Eliabe Nascimento.</text:span></text:p>
      <text:p text:style-name="P1"/>
      <text:p text:style-name="P1"><draw:frame draw:style-name="fr1" draw:name="Figura8" text:anchor-type="char" svg:width="17cm" svg:height="7.445cm" draw:z-index="7"><draw:image xlink:href="Pictures/100000000000075E0000033A59F937644D0CC7C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rro: na tela de registro de entrada, é possível cadastrar um novo tipo apenas inserindo números.</text:p>
      <text:p text:style-name="P6">Atenção: Erro não corrigido.</text:p>
      <text:p text:style-name="P1"/>
      <text:p text:style-name="P1"><draw:frame draw:style-name="fr1" draw:name="Figura7" text:anchor-type="char" svg:width="17cm" svg:height="7.706cm" draw:z-index="6"><draw:image xlink:href="Pictures/100000000000076000000358E2C08240A729BE8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Erro: ao preencher todos os campos (exceto o campo “Organização”) e depois clicar em “Registrar” </text:p>
      <text:p text:style-name="P2">o sistema mostra uma mensagem solicitando o preenchimento do campo obrigatório “tipo”, mas deveria solicitar o campo “Organização.</text:p>
      <text:p text:style-name="P7"><text:span text:style-name="T2">Corrigido pelo desenvolvedor Eliabe Nascimento.</text:span></text:p>
      <text:p text:style-name="P2"><draw:frame draw:style-name="fr1" draw:name="Figura10" text:anchor-type="char" svg:width="17cm" svg:height="7.273cm" draw:z-index="9"><draw:image xlink:href="Pictures/100000000000076300000329056C3511DBF6F083.png" xlink:type="simple" xlink:show="embed" xlink:actuate="onLoad" draw:mime-type="image/png"/></draw:frame>.</text:p>
      <text:p text:style-name="P2"><draw:frame draw:style-name="fr1" draw:name="Figura11" text:anchor-type="char" svg:width="17cm" svg:height="7.539cm" draw:z-index="10"><draw:image xlink:href="Pictures/100000000000076600000348A71F6C8C92E7C1C8.png" xlink:type="simple" xlink:show="embed" xlink:actuate="onLoad" draw:mime-type="image/png"/></draw:frame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Erro: após registra uma entrada o sistema está mostrando uma mensagem incorreta.</text:p>
      <text:p text:style-name="P7"><text:span text:style-name="T2">Corrigido pelo desenvolvedor Eliabe Nascimento.</text:span></text:p>
      <text:p text:style-name="P2"><draw:frame draw:style-name="fr1" draw:name="Figura12" text:anchor-type="char" svg:width="17cm" svg:height="8.26cm" draw:z-index="11"><draw:image xlink:href="Pictures/100000000000071700000372FB2A9BF41994A9D7.png" xlink:type="simple" xlink:show="embed" xlink:actuate="onLoad" draw:mime-type="image/png"/></draw:frame>.</text:p>
      <text:p text:style-name="P2">Erro: o sistema não está mostrando o valor correto cadastrado como entrada no “quadrado azul referente as entradas”.</text:p>
      <text:p text:style-name="P6">Atenção: Erro não corrigido.</text:p>
      <text:p text:style-name="P2"><draw:frame draw:style-name="fr1" draw:name="Figura13" text:anchor-type="char" svg:width="17cm" svg:height="7.65cm" draw:z-index="12"><draw:image xlink:href="Pictures/100000000000075A0000034F793883FBEB2A4EB5.png" xlink:type="simple" xlink:show="embed" xlink:actuate="onLoad" draw:mime-type="image/png"/></draw:frame>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rro: ao clicar no ícone de configurações dentro do campo “Outras Entradas” abre a opção para editar e excluir o cadastro, porém se o usuário não selecionar nenhuma das duas opções “Editar ou Excluir” e clicar em qualquer outro lugar da tela aparece a mensagem perguntando se o usuário deseja excluir o cadastro. O comportamento correto da aplicação nesse caso era somente sair do menu de configurações sem executar nenhuma ação. </text:p>
      <text:p text:style-name="P7"><text:span text:style-name="T2">Corrigido pelo desenvolvedor Eliabe Nascimento.</text:span></text:p>
      <text:p text:style-name="P2"><draw:frame draw:style-name="fr1" draw:name="Figura14" text:anchor-type="char" svg:width="17cm" svg:height="7.62cm" draw:z-index="13"><draw:image xlink:href="Pictures/100000000000075200000348D97A7527D85873E2.png" xlink:type="simple" xlink:show="embed" xlink:actuate="onLoad" draw:mime-type="image/png"/></draw:frame>Obs.: não cliquei em nenhuma das duas opções “EDITAR OU EXCLUIR, <text:s/>cliquei em outro lugar da tela.</text:p>
      <text:p text:style-name="P2"><draw:frame draw:style-name="fr1" draw:name="Figura15" text:anchor-type="char" svg:width="17cm" svg:height="7.606cm" draw:z-index="14"><draw:image xlink:href="Pictures/100000000000075300000347EDF0A220135556BA.png" xlink:type="simple" xlink:show="embed" xlink:actuate="onLoad" draw:mime-type="image/png"/></draw:frame>.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rro: o sistema permite registrar uma “Entrada ou Saída” alterando a data atual para dia e mês anterior, porém após registrar, e tentar acessar esses registros através da opção “Filtrar” localizada <text:s/>na tela principal do financeiro o sistema não traz os registros cadastrados.</text:p>
      <text:p text:style-name="P7"><text:span text:style-name="T2">Corrigido pelo desenvolvedor Eliabe Nascimento.</text:span></text:p>
      <text:p text:style-name="P2"><draw:frame draw:style-name="fr1" draw:name="Figura16" text:anchor-type="char" svg:width="17cm" svg:height="7.616cm" draw:z-index="15"><draw:image xlink:href="Pictures/1000000000000774000003579E518D4F022B7FAB.png" xlink:type="simple" xlink:show="embed" xlink:actuate="onLoad" draw:mime-type="image/png"/></draw:frame>.</text:p>
      <text:p text:style-name="P2"><draw:frame draw:style-name="fr1" draw:name="Figura17" text:anchor-type="char" svg:width="17cm" svg:height="7.576cm" draw:z-index="16"><draw:image xlink:href="Pictures/10000000000007680000034DA7BE272C5D6BE4C9.png" xlink:type="simple" xlink:show="embed" xlink:actuate="onLoad" draw:mime-type="image/png"/></draw:frame>.</text:p>
      <text:p text:style-name="P2"><draw:frame draw:style-name="fr1" draw:name="Figura18" text:anchor-type="char" svg:width="17cm" svg:height="6.837cm" draw:z-index="17"><draw:image xlink:href="Pictures/1000000000000764000002F97445C8AD7F3DCFE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9T23:29:34.266000000</meta:creation-date>
    <dc:date>2022-12-30T19:12:12.365000000</dc:date>
    <meta:editing-duration>PT4H10M47S</meta:editing-duration>
    <meta:editing-cycles>3</meta:editing-cycles>
    <meta:generator>LibreOffice/7.4.3.2$Windows_X86_64 LibreOffice_project/1048a8393ae2eeec98dff31b5c133c5f1d08b890</meta:generator>
    <meta:document-statistic meta:table-count="0" meta:image-count="21" meta:object-count="0" meta:page-count="12" meta:paragraph-count="47" meta:word-count="552" meta:character-count="3490" meta:non-whitespace-character-count="2977"/>
  </office:meta>
</office:document-meta>
</file>
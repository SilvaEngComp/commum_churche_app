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20000034B56188038FAA3B6C7.png" manifest:media-type="image/png"/>
  <manifest:file-entry manifest:full-path="Pictures/100000010000076E0000036239216DC44DD684D7.png" manifest:media-type="image/png"/>
  <manifest:file-entry manifest:full-path="Pictures/10000001000007790000035D35223BAD2C7A04B0.png" manifest:media-type="image/png"/>
  <manifest:file-entry manifest:full-path="Pictures/100000010000077500000356AE28A1FAB6A63143.png" manifest:media-type="image/png"/>
  <manifest:file-entry manifest:full-path="Pictures/10000001000006AC00000341EF8C01C969E3F163.png" manifest:media-type="image/png"/>
  <manifest:file-entry manifest:full-path="Pictures/100000010000076C0000035BF877C899600FE4D9.png" manifest:media-type="image/png"/>
  <manifest:file-entry manifest:full-path="Pictures/100000010000076900000352675AEC47353F7711.png" manifest:media-type="image/png"/>
  <manifest:file-entry manifest:full-path="Pictures/100000010000074900000351BEAC4E747AE6231E.png" manifest:media-type="image/png"/>
  <manifest:file-entry manifest:full-path="Pictures/1000000100000773000003656BF0EBDFC6F5E2CF.png" manifest:media-type="image/png"/>
  <manifest:file-entry manifest:full-path="Pictures/1000000100000757000003626E91C7429556497D.png" manifest:media-type="image/png"/>
  <manifest:file-entry manifest:full-path="Pictures/10000001000006DF00000350F46F03CAB4C079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8a586"/>
    </style:style>
    <style:style style:name="P4" style:family="paragraph" style:parent-style-name="Heading_20_1">
      <style:text-properties officeooo:paragraph-rsid="001b8b9a"/>
    </style:style>
    <style:style style:name="P5" style:family="paragraph" style:parent-style-name="Heading_20_1">
      <style:text-properties officeooo:rsid="001b8b9a" officeooo:paragraph-rsid="001b8b9a"/>
    </style:style>
    <style:style style:name="P6" style:family="paragraph" style:parent-style-name="Heading_20_2">
      <style:text-properties officeooo:paragraph-rsid="001a0d1b"/>
    </style:style>
    <style:style style:name="P7" style:family="paragraph" style:parent-style-name="Text_20_body">
      <style:text-properties officeooo:rsid="0018a586" officeooo:paragraph-rsid="0018a586"/>
    </style:style>
    <style:style style:name="P8" style:family="paragraph" style:parent-style-name="Text_20_body" style:list-style-name="L1">
      <style:text-properties officeooo:rsid="0018a586" officeooo:paragraph-rsid="0018a586"/>
    </style:style>
    <style:style style:name="P9" style:family="paragraph" style:parent-style-name="Text_20_body">
      <style:text-properties officeooo:rsid="001a0d1b" officeooo:paragraph-rsid="001a0d1b"/>
    </style:style>
    <style:style style:name="P10" style:family="paragraph" style:parent-style-name="Text_20_body">
      <style:text-properties officeooo:paragraph-rsid="001a0d1b"/>
    </style:style>
    <style:style style:name="P11" style:family="paragraph" style:parent-style-name="Text_20_body">
      <style:text-properties officeooo:paragraph-rsid="001b8b9a"/>
    </style:style>
    <style:style style:name="P12" style:family="paragraph" style:parent-style-name="Text_20_body">
      <style:text-properties officeooo:paragraph-rsid="001b9dfd"/>
    </style:style>
    <style:style style:name="T1" style:family="text">
      <style:text-properties officeooo:rsid="001a0d1b"/>
    </style:style>
    <style:style style:name="T2" style:family="text">
      <style:text-properties officeooo:rsid="001b8b9a"/>
    </style:style>
    <style:style style:name="T3" style:family="text">
      <style:text-properties fo:color="#202122" loext:opacity="100%" style:font-name="Arial2" fo:font-size="9pt" fo:background-color="#f8f9fa" loext:char-shading-value="0"/>
    </style:style>
    <style:style style:name="T4" style:family="text">
      <style:text-properties officeooo:rsid="001b9d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de evidências</text:p>
      <text:p text:style-name="Subtitle">Cadastro de um usuário</text:p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 de test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 de teste</text:p>
          </text:index-title>
          <text:p text:style-name="P1"><text:a xlink:type="simple" xlink:href="#__RefHeading___Toc418_671388377" text:style-name="Index_20_Link" text:visited-style-name="Index_20_Link">Acessando sistema na url: https://www.ibnovabetel.enginydigitaleco.com<text:tab/>1</text:a></text:p>
          <text:p text:style-name="P1"><text:a xlink:type="simple" xlink:href="#__RefHeading___Toc526_671388377" text:style-name="Index_20_Link" text:visited-style-name="Index_20_Link">Clicando no botão continuar<text:tab/>2</text:a></text:p>
          <text:p text:style-name="P1"><text:a xlink:type="simple" xlink:href="#__RefHeading___Toc406_671388377" text:style-name="Index_20_Link" text:visited-style-name="Index_20_Link">Preenchendo o formulário de Informações Pessoais<text:tab/>2</text:a></text:p>
          <text:p text:style-name="P1"><text:a xlink:type="simple" xlink:href="#__RefHeading___Toc408_671388377" text:style-name="Index_20_Link" text:visited-style-name="Index_20_Link"><text:tab/>3</text:a></text:p>
          <text:p text:style-name="P2"><text:a xlink:type="simple" xlink:href="#__RefHeading___Toc528_671388377" text:style-name="Index_20_Link" text:visited-style-name="Index_20_Link">Erro: Mesmo o campo número de telefone sendo obrigatório, se não for preenchido o sistema deixa ir para a próxima tela.<text:tab/>3</text:a></text:p>
          <text:p text:style-name="P2"><text:a xlink:type="simple" xlink:href="#__RefHeading___Toc530_671388377" text:style-name="Index_20_Link" text:visited-style-name="Index_20_Link">Erro: Ao tentar finalizar o cadastro sem preencher o campo celular, o sistema apresenta um erro sem descrição<text:tab/>4</text:a></text:p>
          <text:p text:style-name="P1"><text:a xlink:type="simple" xlink:href="#__RefHeading___Toc532_671388377" text:style-name="Index_20_Link" text:visited-style-name="Index_20_Link">Clicando no botão próximo<text:tab/>4</text:a></text:p>
          <text:p text:style-name="P1"><text:a xlink:type="simple" xlink:href="#__RefHeading___Toc534_671388377" text:style-name="Index_20_Link" text:visited-style-name="Index_20_Link">Preenchendo formulário de Endereço<text:tab/>4</text:a></text:p>
          <text:p text:style-name="P1"><text:a xlink:type="simple" xlink:href="#__RefHeading___Toc410_671388377" text:style-name="Index_20_Link" text:visited-style-name="Index_20_Link"><text:tab/>5</text:a></text:p>
          <text:p text:style-name="P2"><text:a xlink:type="simple" xlink:href="#__RefHeading___Toc420_671388377" text:style-name="Index_20_Link" text:visited-style-name="Index_20_Link">Erro: O campo número residência é obrigatório, mesmo sem preencher o número da residência ou mesmo sem marcar a opção sem número, ao clicar em próximo o sistema deixa seguir para o próxima tela do cadastro.<text:tab/>5</text:a></text:p>
          <text:p text:style-name="P1"><text:a xlink:type="simple" xlink:href="#__RefHeading___Toc412_671388377" text:style-name="Index_20_Link" text:visited-style-name="Index_20_Link"><text:tab/>6</text:a></text:p>
          <text:p text:style-name="P1"><text:a xlink:type="simple" xlink:href="#__RefHeading___Toc536_671388377" text:style-name="Index_20_Link" text:visited-style-name="Index_20_Link">Clicando em no botão Próximo<text:tab/>6</text:a></text:p>
          <text:p text:style-name="P1"><text:a xlink:type="simple" xlink:href="#__RefHeading___Toc538_671388377" text:style-name="Index_20_Link" text:visited-style-name="Index_20_Link"><text:tab/>6</text:a></text:p>
          <text:p text:style-name="P1"><text:a xlink:type="simple" xlink:href="#__RefHeading___Toc540_671388377" text:style-name="Index_20_Link" text:visited-style-name="Index_20_Link">Preenchendo o formulário de Login<text:tab/>6</text:a></text:p>
          <text:p text:style-name="P1"><text:a xlink:type="simple" xlink:href="#__RefHeading___Toc414_671388377" text:style-name="Index_20_Link" text:visited-style-name="Index_20_Link">Erro: Após a finalização do cadastro, os dados cadastrados estão continuando na tela. Deveriam ser apagados.<text:tab/>7</text:a></text:p>
          <text:p text:style-name="P1"><text:a xlink:type="simple" xlink:href="#__RefHeading___Toc416_671388377" text:style-name="Index_20_Link" text:visited-style-name="Index_20_Link">Erro: Após a finalização do cadastro não está voltando para a tela inicial, está voltando para a uma tela do cadastro, a tela de login.<text:tab/>7</text:a></text:p>
        </text:index-body>
      </text:table-of-content>
      <text:p text:style-name="Text_20_body"/>
      <text:h text:style-name="Heading_20_1" text:outline-level="1"><text:bookmark-start text:name="__RefHeading___Toc418_671388377"/>Acessando <text:span text:style-name="T2">sistema na url: </text:span><text:span text:style-name="T3"><text:s/>https://www.ibnovabetel.enginydigitaleco.com</text:span><text:bookmark-end text:name="__RefHeading___Toc418_671388377"/></text:h>
      <text:p text:style-name="Text_20_body"/>
      <text:p text:style-name="P11"><draw:frame draw:style-name="fr1" draw:name="Figura7" text:anchor-type="char" svg:width="17cm" svg:height="7.743cm" draw:z-index="6"><draw:image xlink:href="Pictures/100000010000076E0000036239216DC44DD684D7.png" xlink:type="simple" xlink:show="embed" xlink:actuate="onLoad" draw:mime-type="image/png"/></draw:frame><text:soft-page-break/><text:s/></text:p>
      <text:h text:style-name="Heading_20_1" text:outline-level="1"><text:bookmark-start text:name="__RefHeading___Toc526_671388377"/>Clicando no botão continuar<text:bookmark-end text:name="__RefHeading___Toc526_671388377"/></text:h>
      <text:p text:style-name="Text_20_body"><draw:frame draw:style-name="fr1" draw:name="Figura8" text:anchor-type="char" svg:width="17cm" svg:height="7.609cm" draw:z-index="7"><draw:image xlink:href="Pictures/100000010000077500000356AE28A1FAB6A63143.png" xlink:type="simple" xlink:show="embed" xlink:actuate="onLoad" draw:mime-type="image/png"/></draw:frame></text:p>
      <text:h text:style-name="Heading_20_1" text:outline-level="1"><text:bookmark-start text:name="__RefHeading___Toc406_671388377"/>Preenchendo o formulário de Informações Pessoais<text:bookmark-end text:name="__RefHeading___Toc406_671388377"/></text:h>
      <text:list text:style-name="L1">
        <text:list-header>
          <text:p text:style-name="P8"/>
        </text:list-header>
      </text:list>
      <text:h text:style-name="P4" text:outline-level="1"><text:bookmark-start text:name="__RefHeading___Toc408_671388377"/><draw:frame draw:style-name="fr3" draw:name="Figura1" text:anchor-type="char" svg:width="16.365cm" svg:height="7.98cm" draw:z-index="0"><draw:image xlink:href="Pictures/10000001000006AC00000341EF8C01C969E3F163.png" xlink:type="simple" xlink:show="embed" xlink:actuate="onLoad" draw:mime-type="image/png"/></draw:frame><text:soft-page-break/><text:s/><text:bookmark-end text:name="__RefHeading___Toc408_671388377"/></text:h>
      <text:h text:style-name="Heading_20_2" text:outline-level="2"><text:bookmark-start text:name="__RefHeading___Toc528_671388377"/>Erro: <text:span text:style-name="T4">Mesmo o campo número de telefone sendo obrigatório, se não for preenchido o sistema deixa ir para a próxima tela.</text:span><text:bookmark-end text:name="__RefHeading___Toc528_671388377"/></text:h>
      <text:p text:style-name="Text_20_body"><draw:frame draw:style-name="fr1" draw:name="Figura11" text:anchor-type="char" svg:width="17cm" svg:height="7.682cm" draw:z-index="10"><draw:image xlink:href="Pictures/100000010000076C0000035BF877C899600FE4D9.png" xlink:type="simple" xlink:show="embed" xlink:actuate="onLoad" draw:mime-type="image/png"/></draw:frame></text:p>
      <text:h text:style-name="Heading_20_2" text:outline-level="2"><text:bookmark-start text:name="__RefHeading___Toc530_671388377"/><text:soft-page-break/>Erro: Ao tentar finalizar o cadastro sem preencher o campo celular, o sistema apresenta um erro sem descrição<text:bookmark-end text:name="__RefHeading___Toc530_671388377"/></text:h>
      <text:p text:style-name="P12"><draw:frame draw:style-name="fr1" draw:name="Figura12" text:anchor-type="char" svg:width="17cm" svg:height="7.652cm" draw:z-index="11"><draw:image xlink:href="Pictures/10000001000007790000035D35223BAD2C7A04B0.png" xlink:type="simple" xlink:show="embed" xlink:actuate="onLoad" draw:mime-type="image/png"/></draw:frame></text:p>
      <text:h text:style-name="P5" text:outline-level="1"><text:bookmark-start text:name="__RefHeading___Toc532_671388377"/>Clicando no botão próximo<text:bookmark-end text:name="__RefHeading___Toc532_671388377"/></text:h>
      <text:p text:style-name="P11"><draw:frame draw:style-name="fr1" draw:name="Figura9" text:anchor-type="char" svg:width="17cm" svg:height="7.622cm" draw:z-index="8"><draw:image xlink:href="Pictures/100000010000076900000352675AEC47353F7711.png" xlink:type="simple" xlink:show="embed" xlink:actuate="onLoad" draw:mime-type="image/png"/></draw:frame></text:p>
      <text:h text:style-name="P4" text:outline-level="1"><text:bookmark-start text:name="__RefHeading___Toc534_671388377"/>Preenchendo formulário de Endereço<text:bookmark-end text:name="__RefHeading___Toc534_671388377"/></text:h>
      <text:p text:style-name="P7"/>
      <text:h text:style-name="Heading_20_1" text:outline-level="1"><text:soft-page-break/></text:h>
      <text:h text:style-name="P3" text:outline-level="1"><text:bookmark-start text:name="__RefHeading___Toc410_671388377"/><draw:frame draw:style-name="fr3" draw:name="Figura2" text:anchor-type="char" svg:width="16.365cm" svg:height="7.424cm" draw:z-index="1"><draw:image xlink:href="Pictures/10000001000007420000034B56188038FAA3B6C7.png" xlink:type="simple" xlink:show="embed" xlink:actuate="onLoad" draw:mime-type="image/png"/></draw:frame><text:s text:c="2"/><text:bookmark-end text:name="__RefHeading___Toc410_671388377"/></text:h>
      <text:h text:style-name="P6" text:outline-level="2"><text:bookmark-start text:name="__RefHeading___Toc420_671388377"/>Erro: <text:span text:style-name="T1">O campo número residência é obrigatório, mesmo sem preencher o número da residência ou mesmo sem marcar a opção sem número, ao clicar em próximo o sistema deixa seguir para o próxima tela do cadastro.</text:span><text:bookmark-end text:name="__RefHeading___Toc420_671388377"/></text:h>
      <text:p text:style-name="P10"/>
      <text:p text:style-name="P10"><draw:frame draw:style-name="fr1" draw:name="Figura6" text:anchor-type="char" svg:width="17cm" svg:height="7.738cm" draw:z-index="5"><draw:image xlink:href="Pictures/100000010000074900000351BEAC4E747AE6231E.png" xlink:type="simple" xlink:show="embed" xlink:actuate="onLoad" draw:mime-type="image/png"/></draw:frame></text:p>
      <text:h text:style-name="P4" text:outline-level="1"><text:bookmark-start text:name="__RefHeading___Toc412_671388377"/><text:soft-page-break/><text:s/><text:bookmark-end text:name="__RefHeading___Toc412_671388377"/></text:h>
      <text:h text:style-name="P5" text:outline-level="1"><text:bookmark-start text:name="__RefHeading___Toc536_671388377"/>Clicando em no botão Próximo<text:bookmark-end text:name="__RefHeading___Toc536_671388377"/></text:h>
      <text:h text:style-name="P5" text:outline-level="1"><text:bookmark-start text:name="__RefHeading___Toc538_671388377"/><draw:frame draw:style-name="fr2" draw:name="Figura10" text:anchor-type="char" svg:width="17cm" svg:height="7.751cm" draw:z-index="9"><draw:image xlink:href="Pictures/1000000100000773000003656BF0EBDFC6F5E2CF.png" xlink:type="simple" xlink:show="embed" xlink:actuate="onLoad" draw:mime-type="image/png"/></draw:frame><text:s/><text:bookmark-end text:name="__RefHeading___Toc538_671388377"/></text:h>
      <text:h text:style-name="P4" text:outline-level="1"><text:bookmark-start text:name="__RefHeading___Toc540_671388377"/>Preenchendo o formulário de Login<text:bookmark-end text:name="__RefHeading___Toc540_671388377"/></text:h>
      <text:p text:style-name="Text_20_body"/>
      <text:p text:style-name="Text_20_body"><draw:frame draw:style-name="fr1" draw:name="Figura3" text:anchor-type="char" svg:width="17cm" svg:height="7.835cm" draw:z-index="2"><draw:image xlink:href="Pictures/1000000100000757000003626E91C7429556497D.png" xlink:type="simple" xlink:show="embed" xlink:actuate="onLoad" draw:mime-type="image/png"/></draw:frame><text:s/></text:p>
      <text:h text:style-name="Heading_20_1" text:outline-level="1"><text:bookmark-start text:name="__RefHeading___Toc414_671388377"/><draw:frame draw:style-name="fr1" draw:name="Figura4" text:anchor-type="char" svg:width="17cm" svg:height="8.195cm" draw:z-index="3"><draw:image xlink:href="Pictures/10000001000006DF00000350F46F03CAB4C07967.png" xlink:type="simple" xlink:show="embed" xlink:actuate="onLoad" draw:mime-type="image/png"/></draw:frame><text:soft-page-break/>Erro: Após a finalização do cadastro, os dados cadastrados estão continuando na tela. Deveriam ser apagados.<text:bookmark-end text:name="__RefHeading___Toc414_671388377"/></text:h>
      <text:h text:style-name="Heading_20_1" text:outline-level="1"><text:bookmark-start text:name="__RefHeading___Toc416_671388377"/>Erro: Após a finalização do cadastro não está voltando para a tela inicial, está voltando para a uma tela do cadastro, a tela de login.<text:bookmark-end text:name="__RefHeading___Toc416_671388377"/></text:h>
      <text:p text:style-name="P7"/>
      <text:p text:style-name="P9"><draw:frame draw:style-name="fr1" draw:name="Figura5" text:anchor-type="char" svg:width="17cm" svg:height="7.835cm" draw:z-index="4"><draw:image xlink:href="Pictures/1000000100000757000003626E91C7429556497D.png" xlink:type="simple" xlink:show="embed" xlink:actuate="onLoad" draw:mime-type="image/png"/></draw:frame><text:s/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0:24:03.963000000</meta:creation-date>
    <dc:date>2022-11-05T12:05:50.054000000</dc:date>
    <meta:editing-duration>PT1H41M44S</meta:editing-duration>
    <meta:editing-cycles>6</meta:editing-cycles>
    <meta:generator>LibreOffice/7.4.2.3$Windows_X86_64 LibreOffice_project/382eef1f22670f7f4118c8c2dd222ec7ad009daf</meta:generator>
    <meta:document-statistic meta:table-count="0" meta:image-count="12" meta:object-count="0" meta:page-count="7" meta:paragraph-count="38" meta:word-count="324" meta:character-count="1986" meta:non-whitespace-character-count="1680"/>
  </office:meta>
</office:document-meta>
</file>